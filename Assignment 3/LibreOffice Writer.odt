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base Dump File: enterprise_ops_db.sql</text:p>
      <text:p text:style-name="Standard"/>
      <text:p text:style-name="Standard">Download the dump file and load it in PostgreSQL DBMS</text:p>
      <text:p text:style-name="Standard"/>
      <text:p text:style-name="Standard"/>
      <text:p text:style-name="P1">Objective</text:p>
      <text:p text:style-name="Standard">Practice and understand different types of SQL joins by working with a realistic corporate database schema.</text:p>
      <text:p text:style-name="Standard"/>
      <text:p text:style-name="P2">Task A: Import the Database</text:p>
      <text:p text:style-name="Standard">Import the provided PostgreSQL database dump file.</text:p>
      <text:p text:style-name="Standard">Explore the tables and understand the relationships among them.</text:p>
      <text:p text:style-name="Standard"/>
      <text:p text:style-name="Standard"/>
      <text:p text:style-name="P2">Task B: SQL Join Operations</text:p>
      <text:p text:style-name="P1">1. INNER JOIN</text:p>
      <text:p text:style-name="Standard">Show each employee along with their department name.</text:p>
      <text:p text:style-name="Standard"/>
      <text:p text:style-name="P1">2. LEFT JOIN</text:p>
      <text:p text:style-name="Standard">Display all departments and their employees.</text:p>
      <text:p text:style-name="Standard"/>
      <text:p text:style-name="Standard"><text:s/>Include departments even if no employee is assigned to them.</text:p>
      <text:p text:style-name="Standard"/>
      <text:p text:style-name="P1">3. RIGHT JOIN</text:p>
      <text:p text:style-name="Standard">Display all projects and the employees assigned to each project.</text:p>
      <text:p text:style-name="Standard"/>
      <text:p text:style-name="Standard"><text:s/>Include projects even if no employee is assigned to them.</text:p>
      <text:p text:style-name="Standard"/>
      <text:p text:style-name="P1">4. FULL OUTER JOIN</text:p>
      <text:p text:style-name="Standard">Match projects with their clients.</text:p>
      <text:p text:style-name="Standard"/>
      <text:p text:style-name="Standard">Show all projects, including those without clients, and all clients, including those not assigned to any project.</text:p>
      <text:p text:style-name="Standard"/>
      <text:p text:style-name="P1">5. SELF JOIN</text:p>
      <text:p text:style-name="Standard">Show each employee together with their manager’s name.</text:p>
      <text:p text:style-name="Standard"/>
      <text:p text:style-name="P1">6. CROSS JOIN</text:p>
      <text:p text:style-name="Standard">Generate all possible employee–department combinations.</text:p>
      <text:p text:style-name="Standard"/>
      <text:p text:style-name="Standard"/>
      <text:p text:style-name="P3">Deliverables</text:p>
      <text:p text:style-name="Standard">Submit one Word or PDF file containing all tasks.</text:p>
      <text:p text:style-name="Standard"/>
      <text:p text:style-name="Standard">For each task, include:</text:p>
      <text:p text:style-name="Standard"/>
      <text:list text:style-name="L1">
        <text:list-item>
          <text:p text:style-name="P4">The SQL query</text:p>
        </text:list-item>
        <text:list-item>
          <text:p text:style-name="P4">A screenshot of the output</text:p>
        </text:list-item>
        <text:list-item>
          <text:p text:style-name="P4">A short explanation of the result in 2–3 lin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6.2.2.2$Linux_X86_64 LibreOffice_project/620$Build-2</meta:generator>
    <dc:date>2026-06-22T13:31:12.232627667</dc:date>
    <meta:editing-duration>PT2M6S</meta:editing-duration>
    <meta:editing-cycles>3</meta:editing-cycles>
    <meta:document-statistic meta:table-count="0" meta:image-count="0" meta:object-count="0" meta:page-count="1" meta:paragraph-count="29" meta:word-count="191" meta:character-count="1168" meta:non-whitespace-character-count="1009"/>
  </office:meta>
</office:document-meta>
</file>